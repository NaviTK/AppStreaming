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00000003007359E3624BD872B3.png" manifest:media-type="image/png"/>
  <manifest:file-entry manifest:full-path="Pictures/1000000000000400000003001917DFD8C652AF7D.png" manifest:media-type="image/png"/>
  <manifest:file-entry manifest:full-path="Pictures/100000000000040000000300D8BF7A0040F657C8.png" manifest:media-type="image/png"/>
  <manifest:file-entry manifest:full-path="Pictures/1000000000000400000003000849638D6D50BC8D.png" manifest:media-type="image/png"/>
  <manifest:file-entry manifest:full-path="Pictures/100000000000040000000300D70B495268DBAEBA.png" manifest:media-type="image/png"/>
  <manifest:file-entry manifest:full-path="Pictures/100000000000040000000300C5AAFC6F594C2CC0.png" manifest:media-type="image/png"/>
  <manifest:file-entry manifest:full-path="Pictures/1000000000000400000003008FE3C636A0D4E026.png" manifest:media-type="image/png"/>
  <manifest:file-entry manifest:full-path="Pictures/1000000000000400000003005021F2AD265D6A24.png" manifest:media-type="image/png"/>
  <manifest:file-entry manifest:full-path="Pictures/100000000000040000000300E1276394047A2554.png" manifest:media-type="image/png"/>
  <manifest:file-entry manifest:full-path="Pictures/1000000000000400000003006EB219CB404A2FB1.png" manifest:media-type="image/png"/>
  <manifest:file-entry manifest:full-path="Pictures/100000000000040000000300BD1965FE8B66A596.png" manifest:media-type="image/png"/>
  <manifest:file-entry manifest:full-path="Pictures/1000000000000400000003001B3600373DC94C8F.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2">
      <style:paragraph-properties fo:break-before="page"/>
    </style:style>
    <style:style style:name="P2" style:family="paragraph" style:parent-style-name="Heading_20_3">
      <style:text-properties officeooo:rsid="00147d7a" officeooo:paragraph-rsid="00147d7a"/>
    </style:style>
    <style:style style:name="P3" style:family="paragraph" style:parent-style-name="Heading_20_3">
      <style:paragraph-properties fo:break-before="page"/>
    </style:style>
    <style:style style:name="P4" style:family="paragraph" style:parent-style-name="Standard">
      <style:text-properties officeooo:paragraph-rsid="0011c4e1"/>
    </style:style>
    <style:style style:name="P5" style:family="paragraph" style:parent-style-name="Standard">
      <style:paragraph-properties fo:break-before="page"/>
    </style:style>
    <style:style style:name="P6" style:family="paragraph" style:parent-style-name="Text_20_body" style:list-style-name="L1"/>
    <style:style style:name="P7" style:family="paragraph" style:parent-style-name="Text_20_body">
      <style:text-properties fo:font-style="italic"/>
    </style:style>
    <style:style style:name="P8" style:family="paragraph" style:parent-style-name="Text_20_body" style:list-style-name="L3"/>
    <style:style style:name="P9" style:family="paragraph" style:parent-style-name="Text_20_body" style:list-style-name="L3">
      <style:text-properties officeooo:paragraph-rsid="0010aa06"/>
    </style:style>
    <style:style style:name="P10" style:family="paragraph" style:parent-style-name="Text_20_body" style:list-style-name="L3">
      <style:text-properties officeooo:paragraph-rsid="0011c4e1"/>
    </style:style>
    <style:style style:name="P11" style:family="paragraph" style:parent-style-name="Text_20_body" style:list-style-name="L3">
      <style:text-properties officeooo:paragraph-rsid="00135b2e"/>
    </style:style>
    <style:style style:name="P12" style:family="paragraph" style:parent-style-name="Text_20_body" style:list-style-name="L3">
      <style:text-properties officeooo:paragraph-rsid="00147d7a"/>
    </style:style>
    <style:style style:name="P13" style:family="paragraph" style:parent-style-name="Text_20_body" style:list-style-name="L3">
      <style:text-properties fo:font-weight="bold" officeooo:rsid="00135b2e" officeooo:paragraph-rsid="00135b2e" style:font-weight-asian="bold" style:font-weight-complex="bold"/>
    </style:style>
    <style:style style:name="P14" style:family="paragraph" style:parent-style-name="Text_20_body" style:list-style-name="L3">
      <style:text-properties fo:font-weight="bold" officeooo:rsid="00135b2e" officeooo:paragraph-rsid="00147d7a" style:font-weight-asian="bold" style:font-weight-complex="bold"/>
    </style:style>
    <style:style style:name="P15" style:family="paragraph" style:parent-style-name="Text_20_body">
      <style:text-properties fo:font-weight="bold" officeooo:paragraph-rsid="00147d7a" style:font-weight-asian="bold" style:font-weight-complex="bold"/>
    </style:style>
    <style:style style:name="P16" style:family="paragraph" style:parent-style-name="Text_20_body">
      <style:text-properties fo:font-weight="bold"/>
    </style:style>
    <style:style style:name="P17" style:family="paragraph" style:parent-style-name="Text_20_body" style:list-style-name="L18">
      <style:text-properties fo:font-weight="bold"/>
    </style:style>
    <style:style style:name="P18" style:family="paragraph" style:parent-style-name="Text_20_body" style:list-style-name="L4"/>
    <style:style style:name="P19" style:family="paragraph" style:parent-style-name="Text_20_body" style:list-style-name="L4">
      <style:text-properties officeooo:paragraph-rsid="00147d7a"/>
    </style:style>
    <style:style style:name="P20" style:family="paragraph" style:parent-style-name="Text_20_body" style:list-style-name="L6"/>
    <style:style style:name="P21" style:family="paragraph" style:parent-style-name="Text_20_body" style:list-style-name="L7"/>
    <style:style style:name="P22" style:family="paragraph" style:parent-style-name="Text_20_body">
      <style:text-properties officeooo:paragraph-rsid="000fcae8"/>
    </style:style>
    <style:style style:name="P23" style:family="paragraph" style:parent-style-name="Text_20_body">
      <style:text-properties officeooo:paragraph-rsid="0010aa06"/>
    </style:style>
    <style:style style:name="P24" style:family="paragraph" style:parent-style-name="Text_20_body">
      <style:text-properties officeooo:paragraph-rsid="0011c4e1"/>
    </style:style>
    <style:style style:name="P25" style:family="paragraph" style:parent-style-name="Text_20_body">
      <style:paragraph-properties fo:break-before="page"/>
      <style:text-properties officeooo:paragraph-rsid="0011c4e1"/>
    </style:style>
    <style:style style:name="P26" style:family="paragraph" style:parent-style-name="Text_20_body" style:list-style-name="L3">
      <style:text-properties officeooo:rsid="00135b2e" officeooo:paragraph-rsid="00135b2e"/>
    </style:style>
    <style:style style:name="P27" style:family="paragraph" style:parent-style-name="Text_20_body">
      <style:text-properties officeooo:rsid="00135b2e" officeooo:paragraph-rsid="00135b2e"/>
    </style:style>
    <style:style style:name="P28" style:family="paragraph" style:parent-style-name="Text_20_body">
      <style:text-properties officeooo:paragraph-rsid="00135b2e"/>
    </style:style>
    <style:style style:name="P29" style:family="paragraph" style:parent-style-name="Text_20_body" style:list-style-name="L3">
      <style:text-properties officeooo:rsid="0013613c" officeooo:paragraph-rsid="0013613c"/>
    </style:style>
    <style:style style:name="P30" style:family="paragraph" style:parent-style-name="Text_20_body" style:list-style-name="L3">
      <style:text-properties officeooo:rsid="00147d7a" officeooo:paragraph-rsid="00147d7a"/>
    </style:style>
    <style:style style:name="P31" style:family="paragraph" style:parent-style-name="Text_20_body">
      <style:text-properties officeooo:paragraph-rsid="00147d7a"/>
    </style:style>
    <style:style style:name="P32" style:family="paragraph" style:parent-style-name="Text_20_body">
      <style:text-properties fo:font-weight="normal" officeooo:rsid="00147d7a" officeooo:paragraph-rsid="00147d7a" style:font-weight-asian="normal" style:font-weight-complex="normal"/>
    </style:style>
    <style:style style:name="P33" style:family="paragraph" style:parent-style-name="Text_20_body">
      <style:text-properties fo:font-weight="normal" officeooo:rsid="00152d95" officeooo:paragraph-rsid="00152d95" style:font-weight-asian="normal" style:font-weight-complex="normal"/>
    </style:style>
    <style:style style:name="P34" style:family="paragraph" style:parent-style-name="Text_20_body">
      <style:text-properties fo:font-weight="normal" officeooo:paragraph-rsid="00147d7a" style:font-weight-asian="normal" style:font-weight-complex="normal"/>
    </style:style>
    <style:style style:name="P35" style:family="paragraph" style:parent-style-name="Text_20_body">
      <style:text-properties officeooo:paragraph-rsid="00152d95"/>
    </style:style>
    <style:style style:name="P36" style:family="paragraph" style:parent-style-name="Text_20_body" style:list-style-name="L12"/>
    <style:style style:name="P37" style:family="paragraph" style:parent-style-name="Text_20_body" style:list-style-name="L13"/>
    <style:style style:name="P38" style:family="paragraph" style:parent-style-name="Text_20_body" style:list-style-name="L14"/>
    <style:style style:name="P39" style:family="paragraph" style:parent-style-name="Text_20_body" style:list-style-name="L15"/>
    <style:style style:name="P40" style:family="paragraph" style:parent-style-name="Text_20_body" style:list-style-name="L16"/>
    <style:style style:name="P41" style:family="paragraph" style:parent-style-name="Text_20_body" style:list-style-name="L17"/>
    <style:style style:name="P42" style:family="paragraph" style:parent-style-name="Text_20_body" style:list-style-name="L18"/>
    <style:style style:name="P43" style:family="paragraph" style:parent-style-name="Text_20_body" style:list-style-name="L19"/>
    <style:style style:name="P44" style:family="paragraph" style:parent-style-name="Text_20_body" style:list-style-name="L20"/>
    <style:style style:name="P45" style:family="paragraph" style:parent-style-name="Text_20_body" style:list-style-name="L21"/>
    <style:style style:name="P46" style:family="paragraph" style:parent-style-name="Text_20_body" style:list-style-name="L21">
      <style:paragraph-properties fo:break-before="page"/>
    </style:style>
    <style:style style:name="P47" style:family="paragraph" style:parent-style-name="Text_20_body" style:list-style-name="">
      <style:paragraph-properties fo:line-height="115%"/>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13613c" style:font-weight-asian="bold" style:font-weight-complex="bold"/>
    </style:style>
    <style:style style:name="T4" style:family="text">
      <style:text-properties fo:font-weight="bold" officeooo:rsid="00152d95" style:font-weight-asian="bold" style:font-weight-complex="bold"/>
    </style:style>
    <style:style style:name="T5" style:family="text">
      <style:text-properties fo:font-style="italic"/>
    </style:style>
    <style:style style:name="T6" style:family="text">
      <style:text-properties officeooo:rsid="000fcae8"/>
    </style:style>
    <style:style style:name="T7" style:family="text">
      <style:text-properties style:font-name="Liberation Serif" officeooo:rsid="000fcae8" style:font-name-asian="Liberation Serif" style:font-name-complex="Liberation Serif"/>
    </style:style>
    <style:style style:name="T8" style:family="text">
      <style:text-properties style:font-name="Liberation Serif" officeooo:rsid="0010aa06" style:font-name-asian="Liberation Serif" style:font-name-complex="Liberation Serif"/>
    </style:style>
    <style:style style:name="T9" style:family="text">
      <style:text-properties style:font-name="Liberation Serif" officeooo:rsid="0011c4e1" style:font-name-asian="Liberation Serif" style:font-name-complex="Liberation Serif"/>
    </style:style>
    <style:style style:name="T10" style:family="text">
      <style:text-properties officeooo:rsid="0010aa06"/>
    </style:style>
    <style:style style:name="T11" style:family="text">
      <style:text-properties officeooo:rsid="0011c4e1"/>
    </style:style>
    <style:style style:name="T12" style:family="text">
      <style:text-properties officeooo:rsid="00135b2e"/>
    </style:style>
    <style:style style:name="T13" style:family="text">
      <style:text-properties fo:font-weight="normal" style:font-weight-asian="normal" style:font-weight-complex="normal"/>
    </style:style>
    <style:style style:name="T14" style:family="text">
      <style:text-properties fo:font-weight="normal" officeooo:rsid="0013613c" style:font-weight-asian="normal" style:font-weight-complex="normal"/>
    </style:style>
    <style:style style:name="T15" style:family="text">
      <style:text-properties fo:font-weight="normal" officeooo:rsid="00147d7a" style:font-weight-asian="normal" style:font-weight-complex="normal"/>
    </style:style>
    <style:style style:name="T16" style:family="text">
      <style:text-properties fo:font-weight="normal" officeooo:rsid="00152d95" style:font-weight-asian="normal" style:font-weight-complex="normal"/>
    </style:style>
    <style:style style:name="T17" style:family="text">
      <style:text-properties officeooo:rsid="0013613c"/>
    </style:style>
    <style:style style:name="T18" style:family="text">
      <style:text-properties officeooo:rsid="00147d7a"/>
    </style:style>
    <style:style style:name="T19" style:family="text">
      <style:text-properties officeooo:rsid="00152d95"/>
    </style:style>
    <style:style style:name="T20" style:family="text">
      <style:text-properties officeooo:rsid="001887ea"/>
    </style:style>
    <style:style style:name="T21" style:family="text">
      <style:text-properties officeooo:rsid="001a32e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bullet text:level="1" text:style-name="Bullet_20_Symbols" loext:num-list-format="%1%." style:num-suffix="." text:bullet-char="•">
        <style:list-level-properties text:space-before="0.752cm" text:min-label-width="0.499cm"/>
      </text:list-level-style-bullet>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
      <text:list-level-style-bullet text:level="1" text:style-name="Bullet_20_Symbols" loext:num-list-format="%1%." style:num-suffix="." text:bullet-char="•">
        <style:list-level-properties text:space-before="0.752cm" text:min-label-width="0.499cm"/>
      </text:list-level-style-bullet>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
      <text:list-level-style-bullet text:level="1" text:style-name="Bullet_20_Symbols" loext:num-list-format="%1%." style:num-suffix="." text:bullet-char="•">
        <style:list-level-properties text:space-before="0.752cm" text:min-label-width="0.499cm"/>
      </text:list-level-style-bullet>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2">
      <text:list-level-style-bullet text:level="1" text:style-name="Bullet_20_Symbols" loext:num-list-format="%1%." style:num-suffix="." text:bullet-char="•">
        <style:list-level-properties text:space-before="0.752cm" text:min-label-width="0.499cm"/>
      </text:list-level-style-bullet>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3">
      <text:list-level-style-bullet text:level="1" text:style-name="Bullet_20_Symbols" loext:num-list-format="%1%." style:num-suffix="." text:bullet-char="•">
        <style:list-level-properties text:space-before="0.752cm" text:min-label-width="0.499cm"/>
      </text:list-level-style-bullet>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4">
      <text:list-level-style-bullet text:level="1" text:style-name="Bullet_20_Symbols" loext:num-list-format="%1%." style:num-suffix="." text:bullet-char="•">
        <style:list-level-properties text:space-before="0.752cm" text:min-label-width="0.499cm"/>
      </text:list-level-style-bullet>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5">
      <text:list-level-style-bullet text:level="1" text:style-name="Bullet_20_Symbols" loext:num-list-format="%1%." style:num-suffix="." text:bullet-char="•">
        <style:list-level-properties text:space-before="0.752cm" text:min-label-width="0.499cm"/>
      </text:list-level-style-bullet>
      <text:list-level-style-number text:level="2" text:style-name="Numbering_20_Symbols" loext:num-list-format="%2%." style:num-suffix="." style:num-format="1">
        <style:list-level-properties text:space-before="2.002cm" text:min-label-width="0.499cm"/>
      </text:list-level-style-number>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7">
      <text:list-level-style-bullet text:level="1" text:style-name="Bullet_20_Symbols" loext:num-list-format="%1%." style:num-suffix="." text:bullet-char="•">
        <style:list-level-properties text:space-before="0.752cm" text:min-label-width="0.499cm"/>
      </text:list-level-style-bullet>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8">
      <text:list-level-style-bullet text:level="1" text:style-name="Bullet_20_Symbols" loext:num-list-format="%1%." style:num-suffix="." text:bullet-char="•">
        <style:list-level-properties text:space-before="0.752cm" text:min-label-width="0.499cm"/>
      </text:list-level-style-bullet>
      <text:list-level-style-number text:level="2" text:style-name="Numbering_20_Symbols" loext:num-list-format="%2%." style:num-suffix="." style:num-format="1">
        <style:list-level-properties text:space-before="2.002cm" text:min-label-width="0.499cm"/>
      </text:list-level-style-number>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1. Visión General</text:h>
      <text:p text:style-name="Text_20_body">El proyecto es un sistema de <text:span text:style-name="T1">Video On Demand (VOD)</text:span> basado en el protocolo <text:span text:style-name="T1">MPEG-DASH</text:span>. Su arquitectura está desacoplada en dos aplicaciones web desplegadas en el mismo servidor(Glassfish):</text:p>
      <text:list xml:id="list1406502690" text:style-name="L1">
        <text:list-item>
          <text:p text:style-name="P6"><text:span text:style-name="T1">API-RESTStreaming (Backend):</text:span> Se encarga de leer el disco duro y servir los archivos de vídeo (manifiesto <text:span text:style-name="Source_20_Text">.mpd</text:span> y segmentos <text:span text:style-name="Source_20_Text">.m4s</text:span>) mediante HTTP. <text:span text:style-name="T6">También realiza conexiones con la base de datos, en este caso solo guardamos los usuarios y si tienen categoría de administrador.</text:span></text:p>
        </text:list-item>
        <text:list-item>
          <text:p text:style-name="P6"><text:span text:style-name="T1">ClienteStreaming (Frontend):</text:span> Es la interfaz web que consume la API y reproduce el vídeo utilizando la librería <text:span text:style-name="Source_20_Text">dash.js</text:span>.</text:p>
        </text:list-item>
      </text:list>
      <text:p text:style-name="Horizontal_20_Line"/>
      <text:h text:style-name="Heading_20_2" text:outline-level="2">2. Módulo Backend: <text:span text:style-name="Source_20_Text">API-RESTStreaming</text:span></text:h>
      <text:p text:style-name="P22"><text:span text:style-name="T5">Este proyecto actúa como el servidor de datos. No tiene interfaz gráfica, solo responde peticiones HTTP.</text:span></text:p>
      <text:p text:style-name="P22"><text:bookmark-start text:name="__DdeLink__22_3368071457"/><text:span text:style-name="Source_20_Text">JakartaEE91Resource.java</text:span> </text:p>
      <text:list xml:id="list2280009285" text:style-name="L3">
        <text:list-item>
          <text:p text:style-name="P8"><text:span text:style-name="T1">Responsabilidad:</text:span> Controlador REST (Endpoint).</text:p>
        </text:list-item>
        <text:list-item>
          <text:p text:style-name="P8"><text:span text:style-name="T1">Función Principal:</text:span> Recibir las peticiones del navegador y entregar los archivos físicos.</text:p>
        </text:list-item>
        <text:list-item>
          <text:p text:style-name="P9"><text:span text:style-name="T1">Métodos Clave:</text:span><text:bookmark-end text:name="__DdeLink__22_3368071457"/></text:p>
          <text:list>
            <text:list-header>
              <text:p text:style-name="P9"><text:bookmark-start text:name="__DdeLink__5_3368071457"/><text:span text:style-name="Source_20_Text"><text:span text:style-name="T7">● </text:span></text:span><text:bookmark-start text:name="__DdeLink__1_3368071457"/><text:span text:style-name="Source_20_Text"><text:span text:style-name="T8">@</text:span></text:span><text:bookmark-end text:name="__DdeLink__1_3368071457"/><text:span text:style-name="Source_20_Text">GET </text:span><text:span text:style-name="Source_20_Text"><text:span text:style-name="T10">@path(“list”)</text:span></text:span>:<text:bookmark-end text:name="__DdeLink__5_3368071457"/></text:p>
            </text:list-header>
          </text:list>
        </text:list-item>
      </text:list>
      <text:p text:style-name="P23"><text:tab/><text:tab/><text:tab/><text:span text:style-name="T10">devuelve un json con la lista de los nombres de los videos procesados en el <text:tab/><text:tab/><text:tab/>servidor, usa la clase GestionCarpeta para ello.</text:span></text:p>
      <text:p text:style-name="P23"><text:tab/><text:tab/><text:bookmark-start text:name="__DdeLink__9_3368071457"/><text:span text:style-name="Source_20_Text"><text:span text:style-name="T7">● </text:span></text:span><text:bookmark-start text:name="__DdeLink__1_33680714571"/><text:span text:style-name="Source_20_Text"><text:span text:style-name="T8">@</text:span></text:span><text:bookmark-end text:name="__DdeLink__1_33680714571"/><text:span text:style-name="Source_20_Text"><text:span text:style-name="T8">POST</text:span></text:span><text:span text:style-name="Source_20_Text"> </text:span><text:span text:style-name="Source_20_Text"><text:span text:style-name="T10">@path(“upload”)</text:span></text:span>:</text:p>
      <text:p text:style-name="P23"><text:tab/><text:tab/><text:tab/><text:span text:style-name="T10">recibe un video en formato octet_stream lo procesa con el script ffmpeg que <text:tab/><text:tab/><text:tab/>esta en la clase conversor.java de utils, cuando acaba sino ha habido ningun <text:tab/><text:tab/><text:tab/>problema devuelve la peticion con el codigo 200 “ok”.</text:span><text:bookmark-end text:name="__DdeLink__9_3368071457"/></text:p>
      <text:p text:style-name="P23"><text:tab/><text:tab/><text:span text:style-name="Source_20_Text"><text:span text:style-name="T7">● </text:span></text:span><text:bookmark-start text:name="__DdeLink__1_336807145711"/><text:span text:style-name="Source_20_Text"><text:span text:style-name="T8">@</text:span></text:span><text:bookmark-end text:name="__DdeLink__1_336807145711"/><text:span text:style-name="Source_20_Text"><text:span text:style-name="T8">DELETE</text:span></text:span><text:span text:style-name="Source_20_Text"> </text:span><text:bookmark-start text:name="__DdeLink__15_3368071457"/><text:span text:style-name="Source_20_Text"><text:span text:style-name="T10">@path(“delete/{nombre}”)</text:span></text:span>:<text:bookmark-end text:name="__DdeLink__15_3368071457"/></text:p>
      <text:p text:style-name="P23"><text:tab/><text:tab/><text:tab/><text:span text:style-name="T10">elimina un video de la carpeta de videos, utiliza la clase GestionCarpeta.</text:span></text:p>
      <text:p text:style-name="P23"><text:span text:style-name="Source_20_Text"><text:span text:style-name="T7"><text:tab/><text:tab/></text:span></text:span><text:bookmark-start text:name="__DdeLink__18_3368071457"/><text:span text:style-name="Source_20_Text"><text:span text:style-name="T7">● </text:span></text:span><text:bookmark-start text:name="__DdeLink__1_3368071457111"/><text:span text:style-name="Source_20_Text"><text:span text:style-name="T8">@</text:span></text:span><text:bookmark-end text:name="__DdeLink__1_3368071457111"/><text:span text:style-name="Source_20_Text"><text:span text:style-name="T8">PUT </text:span></text:span><text:span text:style-name="Source_20_Text"><text:span text:style-name="T10">@path(“rename”)</text:span></text:span><text:span text:style-name="Source_20_Text"><text:span text:style-name="T8">:</text:span></text:span></text:p>
      <text:p text:style-name="P23"><text:span text:style-name="Source_20_Text"><text:span text:style-name="T8"><text:tab/><text:tab/><text:tab/>recibe el nombre viejo y nuevo de un archivo y lo modifica.</text:span></text:span><text:bookmark-end text:name="__DdeLink__18_3368071457"/></text:p>
      <text:p text:style-name="P4"><text:span text:style-name="Source_20_Text"><text:span text:style-name="T7"><text:tab/><text:tab/>● </text:span></text:span><text:bookmark-start text:name="__DdeLink__1_33680714571111"/><text:span text:style-name="Source_20_Text"><text:span text:style-name="T8">@</text:span></text:span><text:bookmark-end text:name="__DdeLink__1_33680714571111"/><text:span text:style-name="Source_20_Text"><text:span text:style-name="T9">POST</text:span></text:span><text:span text:style-name="Source_20_Text"><text:span text:style-name="T8"> </text:span></text:span><text:span text:style-name="Source_20_Text"><text:span text:style-name="T10">@path(“</text:span></text:span><text:span text:style-name="Source_20_Text"><text:span text:style-name="T11">login</text:span></text:span><text:span text:style-name="Source_20_Text"><text:span text:style-name="T10">”)</text:span></text:span><text:span text:style-name="Source_20_Text"><text:span text:style-name="T8">:</text:span></text:span></text:p>
      <text:p text:style-name="P24"><text:span text:style-name="Source_20_Text"><text:span text:style-name="T8"><text:tab/><text:tab/><text:tab/></text:span></text:span><text:span text:style-name="Source_20_Text"><text:span text:style-name="T9">recibe un intento de login y devuelve en un json si es correcto o no y en caso <text:tab/><text:tab/><text:tab/>de ser correcto si tiene permisos de administrador.</text:span></text:span></text:p>
      <text:p text:style-name="P24"><text:span text:style-name="Source_20_Text"><text:span text:style-name="T9"><text:tab/><text:tab/></text:span></text:span></text:p>
      <text:p text:style-name="P25"><text:span text:style-name="Source_20_Text"><text:span text:style-name="T9"><text:tab/><text:tab/></text:span></text:span><text:span text:style-name="Source_20_Text"><text:span text:style-name="T7">● </text:span></text:span><text:bookmark-start text:name="__DdeLink__1_33680714571112"/><text:span text:style-name="Source_20_Text"><text:span text:style-name="T8">@</text:span></text:span><text:bookmark-end text:name="__DdeLink__1_33680714571112"/><text:span text:style-name="Source_20_Text"><text:span text:style-name="T8">PUT </text:span></text:span><text:span text:style-name="Source_20_Text"><text:span text:style-name="T10">@path(“</text:span></text:span><text:span text:style-name="Source_20_Text"><text:span text:style-name="T11">register</text:span></text:span><text:span text:style-name="Source_20_Text"><text:span text:style-name="T10">”)</text:span></text:span><text:span text:style-name="Source_20_Text"><text:span text:style-name="T8">:</text:span></text:span></text:p>
      <text:p text:style-name="P24"><text:span text:style-name="Source_20_Text"><text:span text:style-name="T8"><text:tab/><text:tab/><text:tab/>recibe </text:span></text:span><text:span text:style-name="Source_20_Text"><text:span text:style-name="T9">una petición para registrar un nuevo usuario en la base de datos y <text:tab/><text:tab/><text:tab/><text:tab/>comprueba si existe o no, en caso de no existir lo crea que el usuario y <text:tab/><text:tab/><text:tab/><text:tab/>contraseña facilitados.</text:span></text:span></text:p>
      <text:p text:style-name="P23"><text:span text:style-name="T7"><text:tab/><text:tab/>● </text:span><text:span text:style-name="Source_20_Text">@GET </text:span><text:span text:style-name="Source_20_Text"><text:span text:style-name="T11">@path</text:span></text:span><text:span text:style-name="Source_20_Text">(stream/{videoName}/{fileName})</text:span>:</text:p>
      <text:p text:style-name="P23"><text:tab/><text:tab/><text:tab/><text:span text:style-name="T11">devuelve archivos mpd o m4s para realizar el streaming.</text:span></text:p>
      <text:p text:style-name="P24"><text:bookmark-start text:name="__DdeLink__25_3368071457"/><text:span text:style-name="Source_20_Text"><text:span text:style-name="T11">Utils/Conversor.java</text:span></text:span></text:p>
      <text:list xml:id="list5804179710491" text:continue-numbering="true" text:style-name="L3">
        <text:list-item>
          <text:p text:style-name="P10"><text:span text:style-name="T1">Responsabilidad:</text:span> <text:span text:style-name="T12">complementar la operación de subida de videos via http.</text:span></text:p>
        </text:list-item>
        <text:list-item>
          <text:p text:style-name="P11"><text:span text:style-name="T1">Función Principal:</text:span> <text:s/><text:span text:style-name="T11">codificar videos de formato mp4 a mpd/m4s</text:span></text:p>
        </text:list-item>
        <text:list-item>
          <text:p text:style-name="P10"><text:span text:style-name="T1">Métodos Clave:</text:span></text:p>
          <text:p text:style-name="P26">ejectutarScriptConversion/generateDash</text:p>
          <text:p text:style-name="P26">Aqui esta la configuracion de conversion de ffmpeg a la vez que estan definidas las carpetas de entrada salida donde estan o estaran los archivos.<text:bookmark-end text:name="__DdeLink__25_3368071457"/></text:p>
        </text:list-item>
      </text:list>
      <text:p text:style-name="P28"><text:span text:style-name="Source_20_Text"><text:span text:style-name="T11">Utils/</text:span></text:span><text:span text:style-name="Source_20_Text"><text:span text:style-name="T12">DBConnection.java</text:span></text:span></text:p>
      <text:list xml:id="list5804087257709" text:continue-numbering="true" text:style-name="L3">
        <text:list-item>
          <text:p text:style-name="P11"><text:span text:style-name="T1">Responsabilidad:</text:span> <text:span text:style-name="T12">Conexion a la base de datos</text:span></text:p>
        </text:list-item>
        <text:list-item>
          <text:p text:style-name="P11"><text:span text:style-name="T1">Función Principal:</text:span> <text:s/><text:span text:style-name="T12">verificar logins, crear usuarios y verificar que existen tambien se devuelve si el usuario tiene permisos de adminsitrador.</text:span></text:p>
        </text:list-item>
        <text:list-item>
          <text:p text:style-name="P11"><text:span text:style-name="T1">Métodos Clave:</text:span></text:p>
          <text:p text:style-name="P13">boolean checkLogin</text:p>
          <text:list>
            <text:list-header>
              <text:p text:style-name="P26">verifica si el login es correcto, o no.</text:p>
            </text:list-header>
          </text:list>
          <text:p text:style-name="P13">boolean existeUsuario</text:p>
          <text:list text:continue-numbering="true">
            <text:list-header>
              <text:p text:style-name="P26">verifica si un usuario existe o no.</text:p>
            </text:list-header>
          </text:list>
        </text:list-item>
      </text:list>
      <text:p text:style-name="P27"><text:tab/><text:span text:style-name="T2">void registrarUsuario</text:span></text:p>
      <text:p text:style-name="P27"><text:tab/><text:tab/>Registra un nuevo usuario en la base de datos</text:p>
      <text:p text:style-name="P27"><text:tab/><text:span text:style-name="T2">boolean esAdmin</text:span></text:p>
      <text:p text:style-name="P27"><text:tab/><text:tab/>comprueba si un usuario tiene permisos de administración</text:p>
      <text:p text:style-name="P28"><text:bookmark-start text:name="__DdeLink__31_3368071457"/><text:span text:style-name="Source_20_Text"><text:span text:style-name="T11">Utils/</text:span></text:span><text:span text:style-name="Source_20_Text"><text:span text:style-name="T12">GestionCarpeta.java</text:span></text:span></text:p>
      <text:list xml:id="list5804420109987" text:continue-numbering="true" text:style-name="L3">
        <text:list-item>
          <text:p text:style-name="P11"><text:span text:style-name="T1">Responsabilidad:</text:span> <text:span text:style-name="T12">facilitar el codigo de otras clases.</text:span></text:p>
        </text:list-item>
        <text:list-item>
          <text:p text:style-name="P11"><text:span text:style-name="T1">Función Principal:</text:span> <text:s/><text:span text:style-name="T12">Realizar operaciones de gestion de archivos</text:span></text:p>
        </text:list-item>
        <text:list-item>
          <text:p text:style-name="P11"><text:span text:style-name="T1">Métodos Clave:</text:span></text:p>
          <text:p text:style-name="P13">void vaciarCarpetaInput()</text:p>
          <text:list>
            <text:list-header>
              <text:p text:style-name="P29">vacia la carpeta raiz de los archivos mp4 para evitar que se llene de archivos temporales.<text:bookmark-end text:name="__DdeLink__31_3368071457"/></text:p>
            </text:list-header>
          </text:list>
          <text:p text:style-name="P13"><text:soft-page-break/>String guardarVideoEnInput(Part filePart, String nombreArchivo)</text:p>
          <text:list text:continue-numbering="true">
            <text:list-header>
              <text:p text:style-name="P29">guarda temporalmente el video proveniente del formulario en la carpeta raiz de los mp4. Devuelve la ruta donde se ha guardado el video.</text:p>
            </text:list-header>
          </text:list>
        </text:list-item>
      </text:list>
      <text:p text:style-name="P27"><text:tab/><text:span text:style-name="T2">List&lt;String&gt; getListaVideos()</text:span></text:p>
      <text:p text:style-name="P27"><text:tab/><text:tab/><text:span text:style-name="T17">devuelve la lista de videos procesados, es decir la lista de carpetas de la carpeta <text:tab/><text:tab/><text:tab/>output del conversor.</text:span></text:p>
      <text:p text:style-name="P27"><text:tab/><text:span text:style-name="T4">Boolean </text:span><text:span text:style-name="T2">borrarVideo(String nombreCarpeta)</text:span></text:p>
      <text:p text:style-name="P27"><text:tab/><text:tab/><text:span text:style-name="T17">borra la carpeta y todo su contenido de forma recuersiva, se usa para facilitar el <text:tab/><text:tab/><text:tab/>borrado de videos.</text:span></text:p>
      <text:p text:style-name="P27"><text:tab/><text:span text:style-name="T2">boolean renombrarVideo(String carpetaActual, String nuevoNombreUsuario)</text:span></text:p>
      <text:p text:style-name="P27"><text:tab/><text:tab/><text:span text:style-name="T17">renombra un carpeta de un video con un nuevo nombre proporcionado por un usuario <text:tab/><text:tab/>administrador.</text:span></text:p>
      <text:p text:style-name="P27"><text:tab/><text:span text:style-name="T2">borrarRecursivamente(File archivo)</text:span></text:p>
      <text:p text:style-name="P27"><text:span text:style-name="T2"><text:tab/><text:tab/></text:span><text:span text:style-name="T14">funcion auxiliar de borrarVideo</text:span></text:p>
      <text:p text:style-name="P27"><text:span text:style-name="T14"><text:tab/></text:span><text:span text:style-name="T3">procesarNuevoVideo(jakarta.servlet.http.Part filePart, String nombreUsuario)</text:span></text:p>
      <text:p text:style-name="P27"><text:span text:style-name="T3"><text:tab/><text:tab/></text:span><text:span text:style-name="T14">procesa un nuevo video con ayuda del conversor.</text:span></text:p>
      <text:p text:style-name="P31"><text:span text:style-name="Source_20_Text"><text:span text:style-name="T11">Utils/</text:span></text:span><text:span text:style-name="Source_20_Text"><text:span text:style-name="T18">VideoTranscoder.java</text:span></text:span></text:p>
      <text:list xml:id="list5805309481766" text:continue-numbering="true" text:style-name="L3">
        <text:list-item>
          <text:p text:style-name="P12"><text:span text:style-name="T1">Responsabilidad:</text:span> <text:span text:style-name="T18">ninguna</text:span></text:p>
        </text:list-item>
        <text:list-item>
          <text:p text:style-name="P12"><text:span text:style-name="T1">Función Principal:</text:span> <text:s/><text:span text:style-name="T18">facilitar la conversion de videos sin necesidad de depender del servidor, se puede hacer de forma manual</text:span></text:p>
        </text:list-item>
        <text:list-item>
          <text:p text:style-name="P12"><text:bookmark-start text:name="__DdeLink__40_3368071457"/><text:span text:style-name="T1">Métodos Clave:</text:span><text:bookmark-end text:name="__DdeLink__40_3368071457"/></text:p>
          <text:p text:style-name="P14">void <text:span text:style-name="T18">main()</text:span></text:p>
          <text:list>
            <text:list-header>
              <text:p text:style-name="P30"><text:span text:style-name="T13">pasa los de videos de una carpeta input de mp4 a otra carpeta output a formato m4s/mpd.</text:span></text:p>
            </text:list-header>
          </text:list>
        </text:list-item>
      </text:list>
      <text:p text:style-name="Horizontal_20_Line"/>
      <text:h text:style-name="Heading_20_2" text:outline-level="2"/>
      <text:h text:style-name="P1" text:outline-level="2">3. Módulo Frontend: <text:span text:style-name="Source_20_Text">ClienteStreaming</text:span></text:h>
      <text:p text:style-name="P7">Este proyecto es lo que ve el usuario final. Gestiona la navegación y el reproductor.</text:p>
      <text:h text:style-name="P2" text:outline-level="3">Filters/admin o Filters/Sesion</text:h>
      <text:list xml:id="list1521664065" text:style-name="L4">
        <text:list-item>
          <text:p text:style-name="P18"><text:bookmark-start text:name="__DdeLink__37_3368071457"/><text:span text:style-name="T1">Responsabilidad:</text:span> <text:span text:style-name="T18">limitar el acceso a usuarios</text:span></text:p>
        </text:list-item>
        <text:list-item>
          <text:p text:style-name="P19"><text:span text:style-name="T1">Función:</text:span></text:p>
          <text:p text:style-name="P19"><text:span text:style-name="T18">Controlar el acceso a ciertos jsp/servlets</text:span><text:bookmark-end text:name="__DdeLink__37_3368071457"/></text:p>
        </text:list-item>
      </text:list>
      <text:h text:style-name="P2" text:outline-level="3"><text:bookmark-start text:name="__DdeLink__44_3368071457"/>Utils/ClienteAPI</text:h>
      <text:list xml:id="list5805136983909" text:continue-numbering="true" text:style-name="L4">
        <text:list-item>
          <text:p text:style-name="P19"><text:span text:style-name="T1">Responsabilidad: </text:span><text:span text:style-name="T15">Comunicacion via http con REST</text:span></text:p>
        </text:list-item>
        <text:list-item>
          <text:p text:style-name="P19"><text:span text:style-name="T1">Función:</text:span></text:p>
          <text:p text:style-name="P19"><text:span text:style-name="T18">facilitar el codigo de los servlets y orquestrar la comunicación con la API rest.</text:span></text:p>
        </text:list-item>
        <text:list-item>
          <text:p text:style-name="P19"><text:span text:style-name="T1">Métodos Clave:</text:span></text:p>
        </text:list-item>
      </text:list>
      <text:p text:style-name="P15">String get(String endpoint)</text:p>
      <text:p text:style-name="P32">Realiza peticion get y devuelve el cuerpo como string.<text:bookmark-end text:name="__DdeLink__44_3368071457"/></text:p>
      <text:p text:style-name="P32"/>
      <text:p text:style-name="P15">boolean delete(String endpoint)</text:p>
      <text:p text:style-name="P32">Realiza peticion delete de un video, <text:span text:style-name="T19">devuelve true si se ha podido borrar</text:span></text:p>
      <text:p text:style-name="P32"/>
      <text:p text:style-name="P15">boolean postStream(String endpoint, InputStream fileStream)</text:p>
      <text:p text:style-name="P33">Realiza un peticion post y devuelve true si se ha podido realizar.</text:p>
      <text:p text:style-name="P33"/>
      <text:p text:style-name="P15">List&lt;String&gt; jsonArrayToList(String json)</text:p>
      <text:p text:style-name="P33">Convierte un json a una lista de strings que soporta comas dentro de los nombres.</text:p>
      <text:p text:style-name="P33"/>
      <text:p text:style-name="P15">int checkLogin(String username, String password)</text:p>
      <text:p text:style-name="P33">Verifica credenciales de un login, puede devolver 0,1,-1 (normal,administrador,error)</text:p>
      <text:p text:style-name="P33"/>
      <text:p text:style-name="P15"><text:s/>boolean register(String username, String password)</text:p>
      <text:p text:style-name="P34">Registra un nuevo usuario. <text:span text:style-name="T19">Devuelve true si ha podido realizar.</text:span></text:p>
      <text:p text:style-name="P34"/>
      <text:p text:style-name="P15">boolean renombrarVideo(String nombreActual, String nuevoNombre)</text:p>
      <text:p text:style-name="P33">Renombra un video, devuelve true si se podido renombrar.</text:p>
      <text:p text:style-name="P15"><text:soft-page-break/>boolean uploadVideo(File archivoVideo, String nombreVideo)</text:p>
      <text:p text:style-name="P35"><text:span text:style-name="T16">sube un video, devuelve true cuando se ha acabado de procesar. El timeout lo hacemos adaptativo al tamaño del archivo con una estimacion a la alta de cuanto deberia tardar en funcion de los mb de video.</text:span></text:p>
      <text:h text:style-name="Heading_20_3" text:outline-level="3"><text:span text:style-name="Source_20_Text">js/JDashPlayer.js</text:span></text:h>
      <text:list xml:id="list3937844887" text:style-name="L6">
        <text:list-item>
          <text:p text:style-name="P20"><text:span text:style-name="T1">Responsabilidad:</text:span> Lógica del Cliente (Wrapper de Dash.js).</text:p>
        </text:list-item>
        <text:list-item>
          <text:p text:style-name="P20"><text:span text:style-name="T1">Función:</text:span> Es una clase JavaScript personalizada que envuelve la librería oficial <text:span text:style-name="Source_20_Text">dash.all.min.js</text:span>.</text:p>
          <text:list>
            <text:list-item>
              <text:p text:style-name="P20"><text:span text:style-name="Source_20_Text">init()</text:span>: Inicializa el reproductor y lo conecta al elemento HTML.</text:p>
            </text:list-item>
            <text:list-item>
              <text:p text:style-name="P20"><text:span text:style-name="Source_20_Text">setQuality(index)</text:span>: Fuerza al reproductor a cambiar a una calidad específica (360p, 720p, etc.).</text:p>
            </text:list-item>
            <text:list-item>
              <text:p text:style-name="P20"><text:span text:style-name="Source_20_Text">setAuto()</text:span>: Activa el algoritmo de bitrate adaptativo (ABR) para que la calidad cambie según la velocidad de internet.</text:p>
            </text:list-item>
            <text:list-item>
              <text:p text:style-name="P20">Monitoreo: Actualiza en tiempo real los datos del dashboard (Bitrate actual, resolución).</text:p>
            </text:list-item>
          </text:list>
        </text:list-item>
      </text:list>
      <text:h text:style-name="Heading_20_3" text:outline-level="3"><text:span text:style-name="Source_20_Text">css/estilo.css</text:span></text:h>
      <text:list xml:id="list3708743180" text:style-name="L7">
        <text:list-item>
          <text:p text:style-name="P21"><text:span text:style-name="T1">Responsabilidad:</text:span> Estilos visuales.</text:p>
        </text:list-item>
        <text:list-item>
          <text:p text:style-name="P21"><text:span text:style-name="T1">Función:</text:span> Define la apariencia del reproductor oscuro, los botones de calidad, la disposición del dashboard y la responsividad de la página.</text:p>
        </text:list-item>
      </text:list>
      <text:h text:style-name="Heading_20_3" text:outline-level="3">Servlets/AdminVideos</text:h>
      <text:p text:style-name="Text_20_body"><text:span text:style-name="T1">Responsabilidad:</text:span> Controlador principal para la gestión y visualización del panel de administración de videos.</text:p>
      <text:p text:style-name="Text_20_body"><text:span text:style-name="T1">Función:</text:span> Su objetivo es preparar los datos necesarios para la vista de administración (<text:span text:style-name="Source_20_Text">admin.jsp</text:span>). Orquesta la obtención del listado de videos desde la API externa utilizando <text:span text:style-name="Source_20_Text">ClienteAPI</text:span>, convierte los datos recibidos y gestiona la visualización de mensajes de retroalimentación (alertas) para el usuario.</text:p>
      <text:p text:style-name="P16">Métodos Clave:</text:p>
      <text:list xml:id="list3257524908" text:style-name="L12">
        <text:list-item>
          <text:p text:style-name="P36"><text:span text:style-name="Source_20_Text">void processRequest(HttpServletRequest request, HttpServletResponse response)</text:span> Ejecuta la lógica central del servlet:</text:p>
          <text:list>
            <text:list-item>
              <text:p text:style-name="P36">Llama a <text:span text:style-name="Source_20_Text">ClienteAPI.get("list")</text:span> para obtener el JSON de videos.</text:p>
            </text:list-item>
            <text:list-item>
              <text:p text:style-name="P36">Convierte el JSON a una lista Java (<text:span text:style-name="Source_20_Text">List&lt;String&gt;</text:span>).</text:p>
            </text:list-item>
            <text:list-item>
              <text:p text:style-name="P36">Establece los atributos <text:span text:style-name="Source_20_Text">listaVideosAdmin</text:span> (datos) y <text:span text:style-name="Source_20_Text">mensajeAlerta</text:span> (notificaciones UI) en el objeto request.</text:p>
            </text:list-item>
            <text:list-item>
              <text:p text:style-name="P36">Despacha la petición hacia <text:span text:style-name="Source_20_Text">admin.jsp</text:span>.</text:p>
            </text:list-item>
          </text:list>
        </text:list-item>
        <text:list-item>
          <text:p text:style-name="P36"><text:soft-page-break/><text:span text:style-name="Source_20_Text">doGet(HttpServletRequest request, HttpServletResponse response)</text:span> Intercepa las peticiones HTTP GET y delega el procesamiento a <text:span text:style-name="Source_20_Text">processRequest</text:span>.</text:p>
        </text:list-item>
        <text:list-item>
          <text:p text:style-name="P36"><text:span text:style-name="Source_20_Text">doPost(HttpServletRequest request, HttpServletResponse response)</text:span> Intercepa las peticiones HTTP POST y delega el procesamiento a <text:span text:style-name="Source_20_Text">processRequest</text:span>.</text:p>
        </text:list-item>
      </text:list>
      <text:h text:style-name="Heading_20_3" text:outline-level="3">Servlets/Eliminar</text:h>
      <text:p text:style-name="Text_20_body"><text:span text:style-name="T1">Responsabilidad:</text:span> Gestión de la eliminación de recursos (videos) mediante comunicación con la API REST.</text:p>
      <text:p text:style-name="Text_20_body"><text:span text:style-name="T1">Función:</text:span> Recibe la solicitud de borrado de una carpeta/video específico, delega la ejecución real a la API externa utilizando <text:span text:style-name="Source_20_Text">ClienteAPI</text:span> y gestiona la navegación de retorno al panel de administración con indicadores de estado (éxito o error).</text:p>
      <text:p text:style-name="P16">Métodos Clave:</text:p>
      <text:list xml:id="list1229141050" text:style-name="L13">
        <text:list-item>
          <text:p text:style-name="P37"><text:span text:style-name="Source_20_Text">void processRequest(HttpServletRequest request, HttpServletResponse response)</text:span> Contiene la lógica de negocio:</text:p>
          <text:list>
            <text:list-item>
              <text:p text:style-name="P37">Captura el parámetro <text:span text:style-name="Source_20_Text">carpeta</text:span> de la solicitud.</text:p>
            </text:list-item>
            <text:list-item>
              <text:p text:style-name="P37">Invoca <text:span text:style-name="Source_20_Text">ClienteAPI.delete("delete/" + nombreCarpeta)</text:span> para realizar el borrado en el servidor remoto.</text:p>
            </text:list-item>
            <text:list-item>
              <text:p text:style-name="P37">Evalúa el resultado booleano y redirige a <text:span text:style-name="Source_20_Text">AdminVideos</text:span> concatenando el parámetro <text:span text:style-name="Source_20_Text">msg</text:span> (<text:span text:style-name="Source_20_Text">borrado</text:span> o <text:span text:style-name="Source_20_Text">error</text:span>) para informar al usuario.</text:p>
            </text:list-item>
          </text:list>
        </text:list-item>
        <text:list-item>
          <text:p text:style-name="P37"><text:span text:style-name="Source_20_Text">doPost(HttpServletRequest request, HttpServletResponse response)</text:span> Punto de entrada principal para las solicitudes de eliminación. Delega en <text:span text:style-name="Source_20_Text">processRequest</text:span>.</text:p>
        </text:list-item>
        <text:list-item>
          <text:p text:style-name="P37"><text:span text:style-name="Source_20_Text">doGet(HttpServletRequest request, HttpServletResponse response)</text:span> Implementa una medida de seguridad. Redirige inmediatamente a <text:span text:style-name="Source_20_Text">AdminVideos</text:span> sin procesar ninguna lógica de borrado, evitando que se puedan eliminar elementos accidentalmente accediendo a la URL directa desde el navegador.</text:p>
        </text:list-item>
      </text:list>
      <text:h text:style-name="Heading_20_3" text:outline-level="3">Servlets/ListaVideos</text:h>
      <text:p text:style-name="Text_20_body"><text:span text:style-name="T1">Responsabilidad:</text:span> Controlador encargado de la gestión de contenidos para la vista pública (menú de usuario).</text:p>
      <text:p text:style-name="Text_20_body"><text:span text:style-name="T1">Función:</text:span> Su función principal es recuperar el catálogo de videos disponibles consumiendo el servicio REST externo. Actúa como intermediario para que la vista (<text:span text:style-name="Source_20_Text">menu.jsp</text:span>) reciba una lista de datos agnóstica de su origen (API remota), permitiendo la visualización del contenido multimedia.</text:p>
      <text:p text:style-name="P16">Métodos Clave:</text:p>
      <text:list xml:id="list555315712" text:style-name="L14">
        <text:list-item>
          <text:p text:style-name="P38"><text:span text:style-name="Source_20_Text">void processRequest(HttpServletRequest request, HttpServletResponse response)</text:span> Ejecuta el flujo de carga de datos:</text:p>
          <text:list>
            <text:list-item>
              <text:p text:style-name="P38"><text:soft-page-break/>Realiza una petición HTTP GET al endpoint <text:span text:style-name="Source_20_Text">list</text:span> mediante <text:span text:style-name="Source_20_Text">ClienteAPI.get("list")</text:span>.</text:p>
            </text:list-item>
            <text:list-item>
              <text:p text:style-name="P38">Transforma la respuesta JSON cruda en una estructura de datos Java (<text:span text:style-name="Source_20_Text">List&lt;String&gt;</text:span>) utilizando el parser de <text:span text:style-name="Source_20_Text">ClienteAPI</text:span>.</text:p>
            </text:list-item>
            <text:list-item>
              <text:p text:style-name="P38">Inyecta la lista resultante en la petición bajo el atributo <text:span text:style-name="Source_20_Text">"listaVideos"</text:span>.</text:p>
            </text:list-item>
            <text:list-item>
              <text:p text:style-name="P38">Redirige el flujo al JSP de presentación (<text:span text:style-name="Source_20_Text">menu.jsp</text:span>).</text:p>
            </text:list-item>
          </text:list>
        </text:list-item>
        <text:list-item>
          <text:p text:style-name="P38"><text:span text:style-name="Source_20_Text">doGet(HttpServletRequest request, HttpServletResponse response)</text:span> Maneja las peticiones GET entrantes y delega la operación a <text:span text:style-name="Source_20_Text">processRequest</text:span>.</text:p>
        </text:list-item>
        <text:list-item>
          <text:p text:style-name="P38"><text:span text:style-name="Source_20_Text">doPost(HttpServletRequest request, HttpServletResponse response)</text:span> Maneja las peticiones POST entrantes y delega la operación a <text:span text:style-name="Source_20_Text">processRequest</text:span>.</text:p>
        </text:list-item>
      </text:list>
      <text:h text:style-name="Heading_20_3" text:outline-level="3">Servlets/Login</text:h>
      <text:p text:style-name="Text_20_body"><text:span text:style-name="T1">Responsabilidad:</text:span> Gestión del proceso de autenticación, control de acceso y creación de sesiones de usuario.</text:p>
      <text:p text:style-name="Text_20_body"><text:span text:style-name="T1">Función:</text:span> Actúa como la puerta de entrada a la aplicación. Recibe las credenciales del formulario, delega la validación de seguridad a la clase auxiliar <text:span text:style-name="Source_20_Text">ClienteAPI</text:span> (que consulta el servicio externo) y gestiona el ciclo de vida de la sesión HTTP, asignando roles ("admin" o "user") y redirigiendo al usuario según el resultado de la validación.</text:p>
      <text:p text:style-name="P16">Métodos Clave:</text:p>
      <text:list xml:id="list1671226555" text:style-name="L15">
        <text:list-item>
          <text:p text:style-name="P39"><text:span text:style-name="Source_20_Text">void processRequest(HttpServletRequest request, HttpServletResponse response)</text:span> Orquesta el flujo de login:</text:p>
          <text:list>
            <text:list-item>
              <text:p text:style-name="P39">Captura los parámetros <text:span text:style-name="Source_20_Text">usuario</text:span> y <text:span text:style-name="Source_20_Text">pass</text:span> del formulario.</text:p>
            </text:list-item>
            <text:list-item>
              <text:p text:style-name="P39">Invoca <text:span text:style-name="Source_20_Text">ClienteAPI.checkLogin(usuario, pass)</text:span> para validar las credenciales remotamente.</text:p>
            </text:list-item>
            <text:list-item>
              <text:p text:style-name="P39"><text:span text:style-name="T1">Si la validación es exitosa (</text:span><text:span text:style-name="Source_20_Text"><text:span text:style-name="T1">resultado != -1</text:span></text:span><text:span text:style-name="T1">)</text:span>:</text:p>
              <text:list>
                <text:list-item>
                  <text:p text:style-name="P39">Inicia una nueva <text:span text:style-name="Source_20_Text">HttpSession</text:span>.</text:p>
                </text:list-item>
                <text:list-item>
                  <text:p text:style-name="P39">Evalúa el entero retornado: si es <text:span text:style-name="Source_20_Text">1</text:span> asigna el rol <text:span text:style-name="T1">"admin"</text:span>, en caso contrario asigna <text:span text:style-name="T1">"user"</text:span>.</text:p>
                </text:list-item>
                <text:list-item>
                  <text:p text:style-name="P39">Redirige al usuario al servlet <text:span text:style-name="Source_20_Text">ListaVideos</text:span>.</text:p>
                </text:list-item>
              </text:list>
            </text:list-item>
            <text:list-item>
              <text:p text:style-name="P39"><text:span text:style-name="T1">Si la validación falla</text:span>:</text:p>
              <text:list>
                <text:list-item>
                  <text:p text:style-name="P39">Inyecta un mensaje de error en el atributo <text:span text:style-name="Source_20_Text">"error"</text:span>.</text:p>
                </text:list-item>
                <text:list-item>
                  <text:p text:style-name="P39">Devuelve la vista <text:span text:style-name="Source_20_Text">login.jsp</text:span> para que el usuario reintente.</text:p>
                </text:list-item>
              </text:list>
            </text:list-item>
          </text:list>
        </text:list-item>
        <text:list-item>
          <text:p text:style-name="P39"><text:span text:style-name="Source_20_Text">doGet(HttpServletRequest request, HttpServletResponse response)</text:span> Fuerza la redirección al formulario de login (<text:span text:style-name="Source_20_Text">login.jsp</text:span>). Evita que se <text:soft-page-break/>procesen intentos de autenticación mediante parámetros en la URL por motivos de seguridad.</text:p>
        </text:list-item>
        <text:list-item>
          <text:p text:style-name="P39"><text:span text:style-name="Source_20_Text">doPost(HttpServletRequest request, HttpServletResponse response)</text:span> Recibe los datos del formulario de login y delega el procesamiento a <text:span text:style-name="Source_20_Text">processRequest</text:span>.</text:p>
        </text:list-item>
      </text:list>
      <text:h text:style-name="Heading_20_3" text:outline-level="3">Servlets/Logout</text:h>
      <text:p text:style-name="Text_20_body"><text:span text:style-name="T1">Responsabilidad:</text:span> Finalización segura de la sesión del usuario y redirección de flujo.</text:p>
      <text:p text:style-name="Text_20_body"><text:span text:style-name="T1">Función:</text:span> Su única función es garantizar que la sesión activa del usuario sea destruida en el servidor, eliminando cualquier atributo de seguridad (como el usuario o el rol) y devolviendo al usuario a la pantalla de inicio de sesión.</text:p>
      <text:p text:style-name="P16">Métodos Clave:</text:p>
      <text:list xml:id="list2670655140" text:style-name="L16">
        <text:list-item>
          <text:p text:style-name="P40"><text:span text:style-name="Source_20_Text">void processRequest(HttpServletRequest request, HttpServletResponse response)</text:span> Ejecuta la lógica de salida:</text:p>
          <text:list>
            <text:list-item>
              <text:p text:style-name="P40">Intenta obtener la sesión actual sin crear una nueva (<text:span text:style-name="Source_20_Text">request.getSession(false)</text:span>).</text:p>
            </text:list-item>
            <text:list-item>
              <text:p text:style-name="P40">Si la sesión existe, invoca <text:span text:style-name="Source_20_Text">session.invalidate()</text:span> para destruirla y liberar los recursos asociados.</text:p>
            </text:list-item>
            <text:list-item>
              <text:p text:style-name="P40">Redirige al navegador a la página <text:span text:style-name="Source_20_Text">login.jsp</text:span>.</text:p>
            </text:list-item>
          </text:list>
        </text:list-item>
        <text:list-item>
          <text:p text:style-name="P40"><text:span text:style-name="Source_20_Text">doGet(HttpServletRequest request, HttpServletResponse response)</text:span> Permite cerrar sesión mediante una simple petición GET (clic en un enlace) y delega a <text:span text:style-name="Source_20_Text">processRequest</text:span>.</text:p>
        </text:list-item>
        <text:list-item>
          <text:p text:style-name="P40"><text:span text:style-name="Source_20_Text">doPost(HttpServletRequest request, HttpServletResponse response)</text:span> Permite cerrar sesión mediante envío de formulario (si fuera necesario) y delega a <text:span text:style-name="Source_20_Text">processRequest</text:span>.</text:p>
        </text:list-item>
      </text:list>
      <text:h text:style-name="Heading_20_3" text:outline-level="3">Servlets/Modificar</text:h>
      <text:p text:style-name="Text_20_body"><text:span text:style-name="T1">Responsabilidad:</text:span> Gestión del flujo de edición (renombrado) de los recursos de video existentes.</text:p>
      <text:p text:style-name="Text_20_body"><text:span text:style-name="T1">Función:</text:span> Opera en dos fases: primero, intercepta la solicitud de edición para cargar el formulario con los datos actuales del video; segundo, procesa los datos enviados por dicho formulario, delegando la ejecución del cambio a la API REST y gestionando la redirección según el resultado de la operación.</text:p>
      <text:p text:style-name="P16">Métodos Clave:</text:p>
      <text:list xml:id="list3505092871" text:style-name="L17">
        <text:list-item>
          <text:p text:style-name="P41"><text:span text:style-name="Source_20_Text">doGet(HttpServletRequest request, HttpServletResponse response)</text:span> <text:span text:style-name="T1">Fase de Visualización:</text:span></text:p>
          <text:list>
            <text:list-item>
              <text:p text:style-name="P41">Captura el parámetro <text:span text:style-name="Source_20_Text">v</text:span> de la URL (el nombre actual de la carpeta).</text:p>
            </text:list-item>
            <text:list-item>
              <text:p text:style-name="P41">Valida que el parámetro no sea nulo; si lo es, redirige al listado principal.</text:p>
            </text:list-item>
            <text:list-item>
              <text:p text:style-name="P41"><text:soft-page-break/>Prepara el atributo <text:span text:style-name="Source_20_Text">carpetaParaEditar</text:span> y despacha la solicitud a <text:span text:style-name="Source_20_Text">modificar.jsp</text:span> para que el usuario vea el formulario con el nombre actual pre-cargado.</text:p>
            </text:list-item>
          </text:list>
        </text:list-item>
        <text:list-item>
          <text:p text:style-name="P41"><text:span text:style-name="Source_20_Text">doPost(HttpServletRequest request, HttpServletResponse response)</text:span> <text:span text:style-name="T1">Fase de Procesamiento:</text:span></text:p>
          <text:list>
            <text:list-item text:start-value="1">
              <text:p text:style-name="P41">Recoge los parámetros del formulario (<text:span text:style-name="Source_20_Text">nombreOriginal</text:span> y <text:span text:style-name="Source_20_Text">nuevoNombre</text:span>).</text:p>
            </text:list-item>
            <text:list-item>
              <text:p text:style-name="P41">Realiza una validación básica para asegurar que los campos no estén vacíos.</text:p>
            </text:list-item>
            <text:list-item>
              <text:p text:style-name="P41">Invoca a <text:span text:style-name="Source_20_Text">ClienteAPI.renombrarVideo(nombreOriginal, nuevoNombre)</text:span> para ejecutar la actualización (PUT) en el servidor remoto.</text:p>
            </text:list-item>
            <text:list-item>
              <text:p text:style-name="P41">Redirige a <text:span text:style-name="Source_20_Text">AdminVideos</text:span> adjuntando un parámetro <text:span text:style-name="Source_20_Text">msg</text:span> (<text:span text:style-name="Source_20_Text">modificado</text:span>, <text:span text:style-name="Source_20_Text">errorModificar</text:span> o <text:span text:style-name="Source_20_Text">camposVacios</text:span>) para notificar al usuario el resultado de la operación.</text:p>
            </text:list-item>
          </text:list>
        </text:list-item>
      </text:list>
      <text:h text:style-name="Heading_20_3" text:outline-level="3">Servlets/Registrar</text:h>
      <text:p text:style-name="Text_20_body"><text:span text:style-name="T1">Responsabilidad:</text:span> Gestión del alta de nuevos usuarios en el sistema.</text:p>
      <text:p text:style-name="Text_20_body"><text:span text:style-name="T1">Función:</text:span> Actúa como intermediario entre el formulario de registro y la API. Su función principal es validar la integridad de los datos de entrada (como la coincidencia de contraseñas) antes de consumir recursos de la API. Si las validaciones locales pasan, solicita la creación del usuario al servicio externo y gestiona la respuesta, permitiendo el acceso o informando de errores (como usuario duplicado).</text:p>
      <text:p text:style-name="P16">Métodos Clave:</text:p>
      <text:list xml:id="list2836612310" text:style-name="L18">
        <text:list-item>
          <text:p text:style-name="P42"><text:span text:style-name="Source_20_Text">void processRequest(HttpServletRequest request, HttpServletResponse response)</text:span> Ejecuta el flujo de registro:</text:p>
          <text:list>
            <text:list-item>
              <text:p text:style-name="P42"><text:span text:style-name="T1">Recogida de datos:</text:span> Captura usuario y contraseñas.</text:p>
            </text:list-item>
            <text:list-item>
              <text:p text:style-name="P42"><text:span text:style-name="T1">Validación Local:</text:span> Verifica que los campos no estén vacíos y que las contraseñas coincidan <text:span text:style-name="T5">antes</text:span> de llamar a la API (ahorrando tráfico innecesario).</text:p>
            </text:list-item>
            <text:list-item>
              <text:p text:style-name="P42"><text:span text:style-name="T1">Llamada a API:</text:span> Si los datos son válidos localmente, invoca <text:span text:style-name="Source_20_Text">ClienteAPI.register(usuario, pass1)</text:span>.</text:p>
            </text:list-item>
            <text:list-item>
              <text:p text:style-name="P17">Gestión de Respuesta:</text:p>
              <text:list>
                <text:list-item>
                  <text:p text:style-name="P42"><text:span text:style-name="T1">Éxito:</text:span> Redirige a <text:span text:style-name="Source_20_Text">login.jsp</text:span> con un indicador de éxito.</text:p>
                </text:list-item>
                <text:list-item>
                  <text:p text:style-name="P42"><text:span text:style-name="T1">Error:</text:span> Si la API devuelve <text:span text:style-name="Source_20_Text">false</text:span> (por ejemplo, usuario existente o error 409), define un mensaje de error, restaura el nombre de usuario ingresado (<text:span text:style-name="Source_20_Text">usuarioPrevio</text:span>) para mejorar la UX y devuelve la vista <text:span text:style-name="Source_20_Text">registrar.jsp</text:span>.</text:p>
                </text:list-item>
              </text:list>
            </text:list-item>
          </text:list>
        </text:list-item>
        <text:list-item>
          <text:p text:style-name="P42"><text:span text:style-name="Source_20_Text">doGet(HttpServletRequest request, HttpServletResponse response)</text:span> Protege el servlet contra ejecuciones accidentales vía URL. Redirige al usuario al formulario <text:span text:style-name="Source_20_Text">registrar.jsp</text:span> para que ingrese los datos correctamente.</text:p>
        </text:list-item>
        <text:list-item>
          <text:p text:style-name="P42"><text:soft-page-break/><text:span text:style-name="Source_20_Text">doPost(HttpServletRequest request, HttpServletResponse response)</text:span> Punto de entrada del formulario. Delega el procesamiento a <text:span text:style-name="Source_20_Text">processRequest</text:span>.</text:p>
        </text:list-item>
      </text:list>
      <text:h text:style-name="Heading_20_3" text:outline-level="3">Servlets/SubirVideo</text:h>
      <text:p text:style-name="Text_20_body"><text:span text:style-name="T1">Responsabilidad:</text:span> Gestión de la carga (upload) de nuevos archivos de video al sistema mediante formularios <text:span text:style-name="Source_20_Text">multipart/form-data</text:span>.</text:p>
      <text:p text:style-name="Text_20_body"><text:span text:style-name="T1">Función:</text:span> Actúa como un "puente" de transferencia. Su función es recibir el flujo de datos binarios (stream) del navegador, convertirlo temporalmente en un archivo físico manejable por el servidor local, y delegar la subida final a la API REST externa. Además, impone límites estrictos al tamaño de los archivos para proteger la memoria del servidor y garantiza la limpieza del disco tras la operación.</text:p>
      <text:p text:style-name="P16">Métodos Clave:</text:p>
      <text:list xml:id="list2384644923" text:style-name="L19">
        <text:list-item>
          <text:p text:style-name="P43"><text:span text:style-name="Source_20_Text">doGet(HttpServletRequest request, HttpServletResponse response)</text:span> Simplemente despacha la solicitud a la vista <text:span text:style-name="Source_20_Text">subirVideo.jsp</text:span> para mostrar el formulario de carga al usuario.</text:p>
        </text:list-item>
        <text:list-item>
          <text:p text:style-name="P43"><text:span text:style-name="Source_20_Text">doPost(HttpServletRequest request, HttpServletResponse response)</text:span> Contiene la lógica compleja de subida:</text:p>
          <text:list>
            <text:list-item>
              <text:p text:style-name="P43"><text:span text:style-name="T1">Recepción y Validación:</text:span> Utiliza <text:span text:style-name="Source_20_Text">request.getPart</text:span> para obtener el archivo de video y valida que los datos no sean nulos.</text:p>
            </text:list-item>
            <text:list-item>
              <text:p text:style-name="P43"><text:span text:style-name="T1">Creación de Archivo Puente (Temp):</text:span> Como el objeto <text:span text:style-name="Source_20_Text">Part</text:span> (stream) no se puede enviar directamente a través de todas las librerías HTTP, crea un archivo temporal en el disco local (<text:span text:style-name="Source_20_Text">File.createTempFile</text:span>) y copia el contenido del video allí.</text:p>
            </text:list-item>
            <text:list-item>
              <text:p text:style-name="P43"><text:span text:style-name="T1">Transferencia a API:</text:span> Invoca a <text:span text:style-name="Source_20_Text">ClienteAPI.uploadVideo(tempFile, nombreUsuario)</text:span>, pasando el archivo físico temporal.</text:p>
            </text:list-item>
            <text:list-item>
              <text:p text:style-name="P43"><text:span text:style-name="T1">Gestión de Respuesta:</text:span> Redirige al panel de administración si la subida es exitosa, o devuelve un error al formulario si falla.</text:p>
            </text:list-item>
            <text:list-item>
              <text:p text:style-name="P43"><text:span text:style-name="T1">Limpieza (Finally):</text:span> En el bloque <text:span text:style-name="Source_20_Text">finally</text:span>, asegura que el archivo temporal creado en el paso 2 sea eliminado (<text:span text:style-name="Source_20_Text">tempFile.delete()</text:span>) para evitar llenar el disco del servidor con "basura" de subidas anteriores.</text:p>
            </text:list-item>
          </text:list>
        </text:list-item>
      </text:list>
      <text:p text:style-name="P16">Notas Adicionales:</text:p>
      <text:list xml:id="list512830147" text:style-name="L20">
        <text:list-item>
          <text:p text:style-name="P44"><text:span text:style-name="T1">Configuración Multipart:</text:span> Utiliza la anotación <text:span text:style-name="Source_20_Text">@MultipartConfig</text:span> para definir límites físicos:</text:p>
          <text:list>
            <text:list-item>
              <text:p text:style-name="P44">Umbral de memoria: 2MB.</text:p>
            </text:list-item>
            <text:list-item>
              <text:p text:style-name="P44">Tamaño máximo de archivo: 500MB.</text:p>
            </text:list-item>
            <text:list-item>
              <text:p text:style-name="P44">Tamaño máximo de petición: 600MB.</text:p>
            </text:list-item>
          </text:list>
        </text:list-item>
      </text:list>
      <text:h text:style-name="P3" text:outline-level="3">Resumen de Vistas (JSPs)</text:h>
      <text:p text:style-name="Text_20_body"/>
      <text:list xml:id="list1138992292" text:style-name="L21">
        <text:list-item>
          <text:p text:style-name="P45"><text:span text:style-name="T1">login.jsp</text:span>: Pantalla de inicio de sesión. Gestiona la autenticación de usuarios y muestra alertas de error/éxito.</text:p>
        </text:list-item>
      </text:list>
      <text:p text:style-name="Text_20_body"><draw:frame draw:style-name="fr3" draw:name="Imagen1" text:anchor-type="char" svg:width="16.249cm" svg:height="12.187cm" draw:z-index="0"><draw:image xlink:href="Pictures/1000000000000400000003001B3600373DC94C8F.png" xlink:type="simple" xlink:show="embed" xlink:actuate="onLoad" draw:mime-type="image/png"/></draw:frame></text:p>
      <text:p text:style-name="P47"><text:span text:style-name="T1"/></text:p>
      <text:list xml:id="list5805119238139" text:continue-numbering="true" text:style-name="L21">
        <text:list-item>
          <text:p text:style-name="P46"><text:span text:style-name="T1">registrar.jsp</text:span>: Formulario de registro. Permite crear nuevos usuarios con validación de contraseñas y usabilidad mejorada (persistencia de datos en error).</text:p>
          <text:p text:style-name="P45"><draw:frame draw:style-name="fr4" draw:name="Imagen2" text:anchor-type="char" svg:width="16.249cm" svg:height="12.187cm" draw:z-index="1"><draw:image xlink:href="Pictures/100000000000040000000300BD1965FE8B66A596.png" xlink:type="simple" xlink:show="embed" xlink:actuate="onLoad" draw:mime-type="image/png"/></draw:frame></text:p>
        </text:list-item>
      </text:list>
      <text:p text:style-name="P47"><text:span text:style-name="T1"/></text:p>
      <text:list xml:id="list5803649219070" text:continue-numbering="true" text:style-name="L21">
        <text:list-item>
          <text:p text:style-name="P46"><text:span text:style-name="T1">menu.jsp</text:span>: Dashboard principal. Muestra el catálogo de videos en una cuadrícula (grid) con buscador en tiempo real y opciones según el rol (Admin/Usuario). <text:span text:style-name="T20">El apartado Gestionar Videos solo aparece si el usuario tiene el rol de admin</text:span></text:p>
          <text:p text:style-name="P45"><draw:frame draw:style-name="fr3" draw:name="Imagen3" text:anchor-type="char" svg:width="16.249cm" svg:height="12.187cm" draw:z-index="2"><draw:image xlink:href="Pictures/1000000000000400000003006EB219CB404A2FB1.png" xlink:type="simple" xlink:show="embed" xlink:actuate="onLoad" draw:mime-type="image/png"/></draw:frame></text:p>
        </text:list-item>
      </text:list>
      <text:p text:style-name="P47"><text:span text:style-name="T1"/></text:p>
      <text:list xml:id="list5805431260718" text:continue-numbering="true" text:style-name="L21">
        <text:list-item>
          <text:p text:style-name="P46"><text:span text:style-name="T1">error.jsp</text:span>: Página de error genérica. Muestra mensajes dinámicos y ofrece un botón de retorno inteligente (al login o al menú) según el contexto.</text:p>
        </text:list-item>
      </text:list>
      <text:p text:style-name="P47"><draw:frame draw:style-name="fr2" draw:name="Imagen4" text:anchor-type="char" svg:width="17cm" svg:height="12.749cm" draw:z-index="3"><draw:image xlink:href="Pictures/100000000000040000000300E1276394047A2554.png" xlink:type="simple" xlink:show="embed" xlink:actuate="onLoad" draw:mime-type="image/png"/></draw:frame><text:span text:style-name="T1"/></text:p>
      <text:list xml:id="list5804049281887" text:continue-numbering="true" text:style-name="L21">
        <text:list-item>
          <text:p text:style-name="P46"><text:span text:style-name="T1">player.jsp</text:span>: El reproductor de video. Integra <text:span text:style-name="Source_20_Text">dash.js</text:span> y <text:span text:style-name="T21">mi</text:span> <text:span text:style-name="Source_20_Text">JDashPlayer.js</text:span> para reproducir el contenido, permitiendo cambio de calidad manual/automático y ver estadísticas.</text:p>
          <text:p text:style-name="P45"><draw:frame draw:style-name="fr3" draw:name="Imagen5" text:anchor-type="char" svg:width="16.249cm" svg:height="12.187cm" draw:z-index="4"><draw:image xlink:href="Pictures/1000000000000400000003005021F2AD265D6A24.png" xlink:type="simple" xlink:show="embed" xlink:actuate="onLoad" draw:mime-type="image/png"/></draw:frame></text:p>
        </text:list-item>
      </text:list>
      <text:p text:style-name="P47"><text:span text:style-name="T1"/></text:p>
      <text:list xml:id="list5805714793275" text:continue-numbering="true" text:style-name="L21">
        <text:list-item>
          <text:p text:style-name="P46"><text:span text:style-name="T1">admin.jsp</text:span>: Panel de gestión. Tabla CRUD donde el administrador ve todos los videos, con accesos directos a modificar, eliminar y subir contenido.</text:p>
        </text:list-item>
      </text:list>
      <text:p text:style-name="P47"><draw:frame draw:style-name="fr2" draw:name="Imagen6" text:anchor-type="char" svg:width="17cm" svg:height="12.749cm" draw:z-index="5"><draw:image xlink:href="Pictures/100000000000040000000300D70B495268DBAEBA.png" xlink:type="simple" xlink:show="embed" xlink:actuate="onLoad" draw:mime-type="image/png"/></draw:frame><text:span text:style-name="T1"/></text:p>
      <text:list xml:id="list5803981560457" text:continue-numbering="true" text:style-name="L21">
        <text:list-item>
          <text:p text:style-name="P46"><text:span text:style-name="T1">eliminar.jsp</text:span>: Confirmación de borrado. "Zona de peligro" visual para evitar borrados accidentales de videos.</text:p>
        </text:list-item>
      </text:list>
      <text:p text:style-name="P47"><draw:frame draw:style-name="fr2" draw:name="Imagen7" text:anchor-type="char" svg:width="17cm" svg:height="12.749cm" draw:z-index="6"><draw:image xlink:href="Pictures/1000000000000400000003000849638D6D50BC8D.png" xlink:type="simple" xlink:show="embed" xlink:actuate="onLoad" draw:mime-type="image/png"/></draw:frame><text:span text:style-name="T1"/></text:p>
      <text:list xml:id="list5805424476911" text:continue-numbering="true" text:style-name="L21">
        <text:list-item>
          <text:p text:style-name="P46"><text:span text:style-name="T1">modificar.jsp</text:span>: Edición de metadatos. Formulario para renombrar videos, mostrando el ID interno (solo lectura) y validando la entrada.</text:p>
        </text:list-item>
      </text:list>
      <text:p text:style-name="P47"><draw:frame draw:style-name="fr2" draw:name="Imagen8" text:anchor-type="char" svg:width="17cm" svg:height="12.749cm" draw:z-index="7"><draw:image xlink:href="Pictures/100000000000040000000300D8BF7A0040F657C8.png" xlink:type="simple" xlink:show="embed" xlink:actuate="onLoad" draw:mime-type="image/png"/></draw:frame><text:span text:style-name="T1"/></text:p>
      <text:list xml:id="list5805257397151" text:continue-numbering="true" text:style-name="L21">
        <text:list-item>
          <text:p text:style-name="P46"><text:span text:style-name="T1">subirVideo.jsp</text:span>: Carga de contenido. Formulario <text:span text:style-name="Source_20_Text">multipart</text:span> para enviar archivos MP4. Incluye un <text:span text:style-name="T1">overlay de carga (spinner)</text:span> con JavaScript para bloquear la pantalla mientras el servidor realiza la conversión pesada a DASH.</text:p>
        </text:list-item>
      </text:list>
      <text:p text:style-name="Text_20_body"><draw:frame draw:style-name="fr3" draw:name="Imagen9" text:anchor-type="char" svg:width="12.813cm" svg:height="9.61cm" draw:z-index="8"><draw:image xlink:href="Pictures/1000000000000400000003008FE3C636A0D4E026.png" xlink:type="simple" xlink:show="embed" xlink:actuate="onLoad" draw:mime-type="image/png"/></draw:frame></text:p>
      <text:p text:style-name="Horizontal_20_Lin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1" draw:name="Imagen10" text:anchor-type="char" svg:x="0.714cm" svg:y="0.185cm" svg:width="15.609cm" svg:height="11.705cm" draw:z-index="10"><draw:image xlink:href="Pictures/1000000000000400000003001917DFD8C652AF7D.png" xlink:type="simple" xlink:show="embed" xlink:actuate="onLoad" draw:mime-type="image/png"/></draw:frame></text:p>
      <text:p text:style-name="Standard"/>
      <text:p text:style-name="P5"/>
      <text:p text:style-name="Standard"/>
      <text:p text:style-name="Standard"><draw:frame draw:style-name="fr2" draw:name="Imagen12" text:anchor-type="char" svg:width="17cm" svg:height="12.749cm" draw:z-index="9"><draw:image xlink:href="Pictures/1000000000000400000003007359E3624BD872B3.png" xlink:type="simple" xlink:show="embed" xlink:actuate="onLoad" draw:mime-type="image/png"/></draw:frame><draw:frame draw:style-name="fr1" draw:name="Imagen13" text:anchor-type="char" svg:x="0.037cm" svg:y="12.917cm" svg:width="17cm" svg:height="12.749cm" draw:z-index="11"><draw:image xlink:href="Pictures/100000000000040000000300C5AAFC6F594C2CC0.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1"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1"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1"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1"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1-06T22:58:00.426045313</meta:creation-date>
    <dc:date>2026-01-07T00:58:03.341881790</dc:date>
    <meta:editing-duration>PT16M26S</meta:editing-duration>
    <meta:editing-cycles>2</meta:editing-cycles>
    <meta:generator>LibreOffice/7.3.7.2$Linux_X86_64 LibreOffice_project/30$Build-2</meta:generator>
    <meta:document-statistic meta:table-count="0" meta:image-count="12" meta:object-count="0" meta:page-count="20" meta:paragraph-count="217" meta:word-count="2659" meta:character-count="18564" meta:non-whitespace-character-count="16152"/>
  </office:meta>
</office:document-meta>
</file>